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6" table:default-cell-style-name="ce25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</text:p>
          </table:table-cell>
          <table:table-cell table:style-name="ce52" office:value-type="string" calcext:value-type="string" table:number-columns-spanned="13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15/04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3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Professionnels de sant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Default"/>
          <table:table-cell table:content-validation-name="val3" office:value-type="string" calcext:value-type="string">
            <text:p>Oui</text:p>
          </table:table-cell>
          <table:table-cell table:style-name="Default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style-name="ce10"/>
          <table:table-cell table:style-name="Default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rdelia</text:p>
          </table:table-cell>
          <table:table-cell table:content-validation-name="val1" office:value-type="date" office:date-value="1981-08-05" calcext:value-type="date">
            <text:p>05/08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style-name="Default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Willow</text:p>
          </table:table-cell>
          <table:table-cell table:content-validation-name="val1" office:value-type="date" office:date-value="1983-12-15" calcext:value-type="date">
            <text:p>15/12/1983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float" office:value="66000" calcext:value-type="float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Riley</text:p>
          </table:table-cell>
          <table:table-cell table:content-validation-name="val1" office:value-type="date" office:date-value="1981-09-29" calcext:value-type="date">
            <text:p>29/09/1981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66000" calcext:value-type="float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00:01:26.1067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4-16T00:03:44.072351000</dc:date>
    <meta:editing-cycles>70</meta:editing-cycles>
    <meta:editing-duration>PT9H46M26S</meta:editing-duration>
    <meta:document-statistic meta:table-count="1" meta:cell-count="109" meta:object-count="1"/>
  </office:meta>
</office:document-meta>
</file>