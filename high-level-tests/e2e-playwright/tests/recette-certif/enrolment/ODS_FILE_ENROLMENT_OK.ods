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6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6"/>
        <table:table-column table:style-name="co4" table:default-cell-style-name="ce30"/>
        <table:table-column table:style-name="co5" table:default-cell-style-name="ce26"/>
        <table:table-column table:style-name="co6" table:number-columns-repeated="2" table:default-cell-style-name="ce25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5"/>
        <table:table-column table:style-name="co12" table:default-cell-style-name="ce57"/>
        <table:table-column table:style-name="co13" table:number-columns-repeated="2" table:default-cell-style-name="ce26"/>
        <table:table-column table:style-name="co13" table:number-columns-repeated="4" table:default-cell-style-name="ce25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</text:p>
          </table:table-cell>
          <table:table-cell table:style-name="ce52" office:value-type="string" calcext:value-type="string" table:number-columns-spanned="13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15/04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09:05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3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40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0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 table:style-name="Default"/>
          <table:table-cell table:style-name="Normal_20_2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Professionnels de santé</text:p>
            <text:p>("oui" ou laisser vide)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style-name="Default"/>
          <table:table-cell table:content-validation-name="val3" office:value-type="string" calcext:value-type="string">
            <text:p>Oui</text:p>
          </table:table-cell>
          <table:table-cell table:style-name="Default"/>
          <table:table-cell table:number-columns-repeated="45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style-name="ce10"/>
          <table:table-cell table:style-name="Default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ordelia</text:p>
          </table:table-cell>
          <table:table-cell table:content-validation-name="val1" office:value-type="date" office:date-value="1981-08-05" calcext:value-type="date">
            <text:p>05/08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style-name="Default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Rosenberg</text:p>
          </table:table-cell>
          <table:table-cell office:value-type="string" calcext:value-type="string">
            <text:p>Willow</text:p>
          </table:table-cell>
          <table:table-cell table:content-validation-name="val1" office:value-type="date" office:date-value="1983-12-15" calcext:value-type="date">
            <text:p>15/12/1983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float" office:value="66000" calcext:value-type="float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5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Riley</text:p>
          </table:table-cell>
          <table:table-cell table:content-validation-name="val1" office:value-type="date" office:date-value="1981-09-29" calcext:value-type="date">
            <text:p>29/09/1981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float" office:value="66000" calcext:value-type="float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/</number:text>
      <number:month/>
      <number:text>/</number:text>
      <number:year/>
    </number:date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1:43:16.11475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meta:initial-creator>Microsoft Office User</meta:initial-creator>
    <meta:creation-date>2019-03-05T14:26:19Z</meta:creation-date>
    <dc:date>2026-06-16T11:43:21.007214000</dc:date>
    <meta:editing-cycles>71</meta:editing-cycles>
    <meta:editing-duration>PT9H46M30S</meta:editing-duration>
    <meta:document-statistic meta:table-count="1" meta:cell-count="109" meta:object-count="1"/>
  </office:meta>
</office:document-meta>
</file>