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640000004E8A5B0367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Candidats.F13">
          <table:error-message table:message-type="stop" table:display="true"/>
        </table:content-validation>
        <table:content-validation table:name="val4" table:base-cell-address="Candidats.H13">
          <table:help-message table:display="true"/>
          <table:error-message table:message-type="stop" table:display="true"/>
        </table:content-validation>
        <table:content-validation table:name="val5" table:base-cell-address="Candidats.J13">
          <table:help-message table:title="E-mail du destinataire des résultats (formateur, enseignant…)" table:display="true">
            <text:p>E-mail du destinataire des résultats (formateur, enseignant…)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5"/>
        <table:table-column table:style-name="co4" table:default-cell-style-name="ce30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57"/>
        <table:table-column table:style-name="co13" table:number-columns-repeated="4" table:default-cell-style-name="ce25"/>
        <table:table-column table:style-name="co13" table:number-columns-repeated="47" table:default-cell-style-name="Default"/>
        <table:table-row table:style-name="ro1">
          <table:table-cell table:style-name="ce1">
            <draw:frame table:end-cell-address="Candidats.B1" table:end-x="0.881cm" table:end-y="1.355cm" draw:z-index="0" draw:name="image1.png" draw:style-name="gr1" draw:text-style-name="P1" svg:width="1.771cm" svg:height="1.355cm" svg:x="0.141cm" svg:y="0cm">
              <draw:image xlink:href="Pictures/10000001000000640000004E8A5B0367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6" table:number-rows-spanned="1">
            <text:p>Liste des candidats</text:p>
          </table:table-cell>
          <table:covered-table-cell table:number-columns-repeated="11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18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6</text:p>
          </table:table-cell>
          <table:table-cell table:style-name="ce52" office:value-type="string" calcext:value-type="string" table:number-columns-spanned="11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18"/>
          <table:covered-table-cell table:number-columns-repeated="2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9/03/2026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1" table:number-rows-spanned="1">
            <text:p>- Candidat né en France : Inscrire France dans la colonne « Pays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)</text:p>
          </table:table-cell>
          <table:table-cell table:style-name="ce12" office:value-type="string" calcext:value-type="string" table:number-columns-spanned="2" table:number-rows-spanned="1">
            <text:p>11:11</text:p>
          </table:table-cell>
          <table:covered-table-cell table:style-name="ce16"/>
          <table:table-cell table:style-name="ce20" office:value-type="string" calcext:value-type="string">
            <text:p>Examiner ODS_FILE_ENROLMENT</text:p>
          </table:table-cell>
          <table:table-cell table:style-name="ce37"/>
          <table:table-cell table:style-name="ce58" office:value-type="string" calcext:value-type="string" table:number-columns-spanned="11" table:number-rows-spanned="1">
            <text:p><text:s text:c="4"/>- Si code Insee : Ne remplir que la colonne « Code Inse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ress ODS_FILE_ENROLMENT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1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room ODS_FILE_ENROLMENT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1" table:number-rows-spanned="1">
            <text:p>- Candidat né à l'étranger : Remplir les colonnes « Pays » et « Nom de la commune » et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8" office:value-type="string" calcext:value-type="string" table:number-columns-spanned="11" table:number-rows-spanned="1">
            <text:p><text:s text:c="7"/>inscrire 99 dans la colonne « Code Insee »</text:p>
          </table:table-cell>
          <table:covered-table-cell table:number-columns-repeated="5" table:style-name="ce65"/>
          <table:covered-table-cell table:style-name="ce77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9" office:value-type="string" calcext:value-type="string" table:number-columns-spanned="16" table:number-rows-spanned="1">
            <text:p>Participants</text:p>
          </table:table-cell>
          <table:covered-table-cell table:number-columns-repeated="11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38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18" table:number-columns-spanned="4" table:number-rows-spanned="3"/>
          <table:covered-table-cell table:number-columns-repeated="3" table:style-name="ce18"/>
          <table:table-cell table:style-name="ce38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38" office:value-type="string" calcext:value-type="string" table:number-columns-spanned="2" table:number-rows-spanned="3">
            <text:p>Certification</text:p>
            <text:p>complémentaire</text:p>
            <text:p>(une seule par candidat)</text:p>
          </table:table-cell>
          <table:covered-table-cell table:style-name="Default"/>
          <table:table-cell table:style-name="Normal_20_2"/>
          <table:table-cell table:number-columns-repeated="46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Buffy</text:p>
          </table:table-cell>
          <table:table-cell table:content-validation-name="val1" office:value-type="date" office:date-value="1981-01-19" calcext:value-type="date">
            <text:p>19/01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style-name="ce10"/>
          <table:table-cell table:number-columns-repeated="47"/>
        </table:table-row>
        <table:table-row table:style-name="ro7">
          <table:table-cell office:value-type="string" calcext:value-type="string">
            <text:p>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/</number:text>
      <number:month/>
      <number:text>/</number:text>
      <number:year/>
    </number:date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4:35:40.90030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crosoft Office User</meta:initial-creator>
    <meta:creation-date>2019-03-05T14:26:19Z</meta:creation-date>
    <dc:date>2026-03-09T14:36:53.219667000</dc:date>
    <meta:editing-cycles>71</meta:editing-cycles>
    <meta:editing-duration>PT9H45M54S</meta:editing-duration>
    <meta:document-statistic meta:table-count="1" meta:cell-count="80" meta:object-count="1"/>
  </office:meta>
</office:document-meta>
</file>