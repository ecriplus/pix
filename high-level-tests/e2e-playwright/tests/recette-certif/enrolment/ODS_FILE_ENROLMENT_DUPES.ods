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6" table:default-cell-style-name="ce25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</text:p>
          </table:table-cell>
          <table:table-cell table:style-name="ce52" office:value-type="string" calcext:value-type="string" table:number-columns-spanned="13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15/04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09:05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3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 table:style-name="Default"/>
          <table:table-cell table:style-name="Normal_20_2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Professionnels de santé</text:p>
            <text:p>("oui" ou laisser vide)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style-name="Default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style-name="Default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/</number:text>
      <number:month/>
      <number:text>/</number:text>
      <number:year/>
    </number:date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1:42:36.24770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meta:initial-creator>Microsoft Office User</meta:initial-creator>
    <meta:creation-date>2019-03-05T14:26:19Z</meta:creation-date>
    <dc:date>2026-06-16T11:43:07.589122000</dc:date>
    <meta:editing-cycles>71</meta:editing-cycles>
    <meta:editing-duration>PT9H46M15S</meta:editing-duration>
    <meta:document-statistic meta:table-count="1" meta:cell-count="91" meta:object-count="1"/>
  </office:meta>
</office:document-meta>
</file>