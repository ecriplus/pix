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9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8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00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2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number-columns-repeated="49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3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style-name="ce30"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3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style-name="ce30"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3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1T23:23:35.781144213</dc:date>
    <meta:editing-cycles>73</meta:editing-cycles>
    <meta:editing-duration>PT9H51M27S</meta:editing-duration>
    <meta:document-statistic meta:table-count="1" meta:cell-count="104" meta:object-count="1"/>
  </office:meta>
</office:document-meta>
</file>