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640000004ECB842D7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3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72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6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1" table:default-cell-style-name="Default"/>
        <table:table-row table:style-name="ro1">
          <table:table-cell table:style-name="ce1">
            <draw:frame table:end-cell-address="'Liste des candidats'.B2" table:end-x="0.881cm" table:end-y="0.213cm" draw:z-index="0" draw:name="image1.png" draw:style-name="gr1" draw:text-style-name="P1" svg:width="1.771cm" svg:height="1.588cm" svg:x="0.141cm" svg:y="0cm">
              <draw:image xlink:href="Pictures/10000001000000640000004ECB842D70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0000</text:p>
          </table:table-cell>
          <table:table-cell table:style-name="ce50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3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4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6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/>
          <table:table-cell table:number-columns-repeated="49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72"/>
          <table:covered-table-cell table:style-name="ce66"/>
          <table:covered-table-cell table:style-name="ce86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/>
          <table:table-cell table:number-columns-repeated="49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8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>
            <text:p>10/08/1980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 table:style-name="ce28"/>
          <table:table-cell table:style-name="ce28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90" table:content-validation-name="val5" office:value-type="string" calcext:value-type="string">
            <text:p>destinataire@gmail.com</text:p>
          </table:table-cell>
          <table:table-cell table:style-name="ce28" table:content-validation-name="val7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9" office:value-type="percentage" office:value="0.15" calcext:value-type="percentage">
            <text:p>15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>
            <text:p>05/12/2005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 table:style-name="ce28"/>
          <table:table-cell table:style-name="ce47"/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 office:value-type="string" calcext:value-type="string">
            <text:p>destinataire@gmail.com</text:p>
          </table:table-cell>
          <table:table-cell table:style-name="ce28" table:content-validation-name="val8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9"/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>
            <text:p>04/04/2004</text:p>
          </table:table-cell>
          <table:table-cell table:style-name="ce28" office:value-type="string" calcext:value-type="string">
            <text:p>M</text:p>
          </table:table-cell>
          <table:table-cell table:style-name="ce47"/>
          <table:table-cell table:style-name="ce28"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 office:value-type="string" calcext:value-type="string">
            <text:p>destinataire@gmail.com</text:p>
          </table:table-cell>
          <table:table-cell table:style-name="ce28" table:content-validation-name="val8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9" office:value-type="percentage" office:value="0.6" calcext:value-type="percentage">
            <text:p>60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8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>
            <text:p>28/06/1925</text:p>
          </table:table-cell>
          <table:table-cell table:style-name="ce28" office:value-type="string" calcext:value-type="string">
            <text:p>M</text:p>
          </table:table-cell>
          <table:table-cell table:style-name="ce47"/>
          <table:table-cell table:style-name="ce28"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/>
          <table:table-cell table:style-name="ce28" table:content-validation-name="val8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9" office:value-type="percentage" office:value="1.5" calcext:value-type="percentage">
            <text:p>150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rosoft Office User</meta:initial-creator>
    <meta:creation-date>2019-03-05T14:26:19Z</meta:creation-date>
    <dc:date>2026-05-05T08:22:12.620708747</dc:date>
    <meta:editing-cycles>69</meta:editing-cycles>
    <meta:editing-duration>PT9H10M42S</meta:editing-duration>
    <meta:document-statistic meta:table-count="1" meta:cell-count="104" meta:object-count="1"/>
  </office:meta>
</office:document-meta>
</file>