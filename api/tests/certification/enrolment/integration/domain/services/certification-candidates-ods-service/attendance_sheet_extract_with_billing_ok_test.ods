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640000004ECB842D7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9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2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0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69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72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84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85" style:family="table-cell" style:parent-style-name="Normal_20_2" style:data-style-name="N0">
      <style:table-cell-properties fo:background-color="#fff5c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97" style:family="table-cell" style:parent-style-name="Default">
      <style:table-cell-properties fo:background-color="#fff5ce"/>
    </style:style>
    <style:style style:name="ce98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2" fo:font-size="11pt" style:font-size-asian="11pt" style:font-size-complex="11pt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6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9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5"/>
          <table:covered-table-cell table:style-name="Normal_20_2"/>
          <table:covered-table-cell/>
          <table:table-cell table:number-columns-repeated="44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6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84"/>
          <table:covered-table-cell table:number-columns-repeated="2" table:style-name="ce96"/>
          <table:covered-table-cell table:style-name="ce98"/>
          <table:covered-table-cell table:style-name="Normal_20_2"/>
          <table:covered-table-cell table:style-name="ce25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69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72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72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72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78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86"/>
          <table:covered-table-cell table:style-name="ce100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11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5"/>
          <table:covered-table-cell table:style-name="Normal_20_2"/>
          <table:covered-table-cell/>
          <table:table-cell table:number-columns-repeated="44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50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5" table:number-columns-spanned="4" table:number-rows-spanned="3"/>
          <table:covered-table-cell table:number-columns-repeated="3" table:style-name="ce25"/>
          <table:table-cell table:style-name="ce50" office:value-type="string" calcext:value-type="string" table:number-columns-spanned="2" table:number-rows-spanned="3">
            <text:p>Tarification</text:p>
          </table:table-cell>
          <table:covered-table-cell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5"/>
          <table:covered-table-cell table:style-name="Normal_20_2"/>
          <table:covered-table-cell/>
          <table:table-cell table:number-columns-repeated="44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5"/>
          <table:covered-table-cell table:style-name="Normal_20_2"/>
          <table:covered-table-cell/>
          <table:table-cell table:number-columns-repeated="44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4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2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99</text:p>
          </table:table-cell>
          <table:table-cell table:style-name="ce32"/>
          <table:table-cell table:style-name="ce32" office:value-type="string" calcext:value-type="string">
            <text:p>Londres</text:p>
          </table:table-cell>
          <table:table-cell table:style-name="ce32" table:content-validation-name="val4" office:value-type="string" calcext:value-type="string">
            <text:p>Angleterre</text:p>
          </table:table-cell>
          <table:table-cell table:style-name="ce94" table:content-validation-name="val5" office:value-type="string" calcext:value-type="string">
            <text:p>destinataire@gmail.com</text:p>
          </table:table-cell>
          <table:table-cell table:style-name="ce32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32" table:content-validation-name="val10" office:value-type="string" calcext:value-type="string">
            <text:p>Payante</text:p>
          </table:table-cell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2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
            <text:p>05/12/2005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2A004</text:p>
          </table:table-cell>
          <table:table-cell table:style-name="ce32"/>
          <table:table-cell table:style-name="ce47"/>
          <table:table-cell table:style-name="ce32" table:content-validation-name="val4" office:value-type="string" calcext:value-type="string">
            <text:p>France</text:p>
          </table:table-cell>
          <table:table-cell table:style-name="ce94" table:content-validation-name="val6" office:value-type="string" calcext:value-type="string">
            <text:p>destinataire@gmail.com</text:p>
          </table:table-cell>
          <table:table-cell table:style-name="ce32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style-name="ce32" table:content-validation-name="val10" office:value-type="string" calcext:value-type="string">
            <text:p>Gratuite</text:p>
          </table:table-cell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3" table:number-rows-repeated="1048545">
          <table:table-cell table:number-columns-repeated="59"/>
        </table:table-row>
        <table:table-row table:style-name="ro3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/>
      <number:text>/</number:text>
      <number:month/>
      <number:text>/</number:text>
      <number:year/>
    </number:dat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meta:initial-creator>Microsoft Office User</meta:initial-creator>
    <meta:creation-date>2019-03-05T14:26:19Z</meta:creation-date>
    <dc:date>2025-08-06T16:20:20.147108000</dc:date>
    <meta:editing-cycles>79</meta:editing-cycles>
    <meta:editing-duration>P1DT5H36M13S</meta:editing-duration>
    <meta:document-statistic meta:table-count="1" meta:cell-count="80" meta:object-count="1"/>
  </office:meta>
</office:document-meta>
</file>