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Liste des candidats" table:style-name="ta1">
        <table:table-row>
          <table:table-cell office:value-type="string">
            <text:p>* Nom de naissance</text:p>
          </table:table-cell>
          <table:table-cell office:value-type="string">
            <text:p>* Prénom</text:p>
          </table:table-cell>
          <table:table-cell office:value-type="string">
            <text:p>Identifiant local</text:p>
          </table:table-cell>
          <table:table-cell office:value-type="string">
            <text:p>Temps majoré ?</text:p>
          </table:table-cell>
          <table:table-cell office:value-type="string">
            <text:p>* Date de naissance (format : jj/mm/aaaa)</text:p>
          </table:table-cell>
          <table:table-cell office:value-type="string">
            <text:p>Nom de la commune</text:p>
          </table:table-cell>
          <table:table-cell office:value-type="string">
            <text:p>Code postal</text:p>
          </table:table-cell>
          <table:table-cell office:value-type="string">
            <text:p>Code Insee</text:p>
          </table:table-cell>
          <table:table-cell office:value-type="string">
            <text:p>Pays</text:p>
          </table:table-cell>
          <table:table-cell office:value-type="string">
            <text:p>E-mail de convocation</text:p>
          </table:table-cell>
          <table:table-cell office:value-type="string">
            <text:p>E-mail du destinataire des résultats (formateur, enseignant…)</text:p>
          </table:table-cell>
          <table:table-cell office:value-type="string">
            <text:p>* Sexe (M ou F)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9.3</meta:generator>
  </office:meta>
</office:document-meta>
</file>